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emp_5f_single_5f_shee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_single_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epart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a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Marke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R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temp_5f_single_5f_sheet" style:display-name="PageStyle_temp_single_shee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7.3.7.2$Linux_X86_64 LibreOffice_project/30$Build-2</meta:generator>
    <meta:document-statistic meta:table-count="1" meta:cell-count="24" meta:object-count="0"/>
    <meta:user-defined meta:name="AppVersion">15.0000</meta:user-defined>
  </office:meta>
</office:document-meta>
</file>