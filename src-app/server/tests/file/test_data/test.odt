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gle Page DOCX Test</text:p>
      <text:p text:style-name="P1"/>
      <text:p text:style-name="P1">This is a test Word document with only one page.</text:p>
      <text:p text:style-name="P1">It contains some text for testing DOCX text extraction and preview gener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WenQuanYi Zen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false" style:font-name-asian="WenQuanYi Zen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font-name-asian="WenQuanYi Zen Hei" style:font-family-asian="'WenQuanYi Zen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0</meta:editing-cycles>
    <meta:editing-duration>P0D</meta:editing-duration>
    <meta:generator>LibreOffice/7.3.7.2$Linux_X86_64 LibreOffice_project/30$Build-2</meta:generator>
    <meta:document-statistic meta:table-count="0" meta:image-count="0" meta:object-count="0" meta:page-count="1" meta:paragraph-count="3" meta:word-count="26" meta:character-count="147" meta:non-whitespace-character-count="124"/>
    <meta:user-defined meta:name="AppVersion">15.0000</meta:user-defined>
  </office:meta>
</office:document-meta>
</file>